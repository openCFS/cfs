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D60000003DF1576F50.png"/>
  <manifest:file-entry manifest:media-type="image/png" manifest:full-path="Pictures/10000200000001E800000073ED8279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781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7.956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draw:fill="none" fo:min-height="2.846cm"/>
    </style:style>
    <style:style style:name="gr13" style:family="graphic" style:parent-style-name="standard">
      <style:graphic-properties draw:stroke="none" draw:fill="none" fo:min-height="1.25cm"/>
    </style:style>
    <style:style style:name="gr14" style:family="graphic" style:parent-style-name="standard">
      <style:graphic-properties draw:stroke="none" draw:fill="none" fo:min-height="3.75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outline1" style:list-style-name="L3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1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e00000"/>
    </style:style>
    <style:style style:name="T4" style:family="text">
      <style:text-properties fo:color="#b80047"/>
    </style:style>
    <style:style style:name="T5" style:family="text">
      <style:text-properties fo:font-family="'Albany AMT'" style:font-style-name="Regular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6" style:family="text">
      <style:text-properties fo:color="#198533"/>
    </style:style>
    <style:style style:name="T7" style:family="text">
      <style:text-properties fo:color="#0000c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8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9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" style:family="text">
      <style:text-properties fo:color="#2a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FS++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Technische Übersicht</text:p>
            <text:p text:style-name="P1"/>
            <text:p text:style-name="P1">Software Engineering POV</text:p>
            <text:p text:style-name="P1"/>
            <text:p text:style-name="P1"/>
            <text:p text:style-name="P1">Fabian Wein</text:p>
            <text:p text:style-name="P1">13.10.0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grenzu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Keine Feature-Übersicht</text:p>
              </text:list-item>
            </text:list>
            <text:list text:style-name="L2">
              <text:list-item>
                <text:p text:style-name="P3">Kein “Marketingvortrag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as ist CFS</text:p>
          </draw:text-box>
        </draw:frame>
        <draw:frame presentation:style-name="pr5" draw:text-style-name="P3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 text:style-name="P3">FEM Implementierung in C++</text:p>
              </text:list-item>
            </text:list>
            <text:list text:style-name="L2">
              <text:list-item>
                <text:list>
                  <text:list-item>
                    <text:p text:style-name="P4">Coupled Field Simulation</text:p>
                  </text:list-item>
                </text:list>
              </text:list-item>
            </text:list>
            <text:list text:style-name="L2">
              <text:list-item>
                <text:p text:style-name="P3">Lehrstuhlsoftware LSE</text:p>
              </text:list-item>
            </text:list>
            <text:list text:style-name="L2">
              <text:list-item>
                <text:list>
                  <text:list-item>
                    <text:p text:style-name="P4">viele Studenten/ Diplomanden und Doktoranden arbeiten dami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viele Diplomanden und Doktoranden entwickeln es weiter.</text:p>
                  </text:list-item>
                </text:list>
              </text:list-item>
            </text:list>
            <text:list text:style-name="L2">
              <text:list-item>
                <text:p text:style-name="P3">Kind von Manfred Kaltenbacher</text:p>
              </text:list-item>
            </text:list>
            <text:list text:style-name="L2">
              <text:list-item>
                <text:list>
                  <text:list-item>
                    <text:p text:style-name="P4">3. (?) Inkarnation</text:p>
                  </text:list-item>
                </text:list>
              </text:list-item>
            </text:list>
            <text:list text:style-name="L2">
              <text:list-item>
                <text:p text:style-name="P3">Basis für NACS von Simetris (Spin-Of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rundschema</text:p>
          </draw:text-box>
        </draw:frame>
        <draw:custom-shape draw:style-name="gr2" draw:text-style-name="P6" draw:layer="layout" svg:width="9cm" svg:height="3.5cm" svg:x="9.5cm" svg:y="10cm">
          <text:p text:style-name="P5"><text:span text:style-name="T1">CF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2cm" svg:x="1.5cm" svg:y="9.5cm">
          <text:p text:style-name="P5"><text:span text:style-name="T1">Modell (Gitter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2cm" svg:x="1.5cm" svg:y="12cm">
          <text:p text:style-name="P5"><text:span text:style-name="T1">Problem (XML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cm" svg:x="21cm" svg:y="9.5cm">
          <text:p text:style-name="P5"><text:span text:style-name="T1">Postprocess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5cm" svg:height="2cm" svg:x="21cm" svg:y="12cm">
          <text:p text:style-name="P5"><text:span text:style-name="T1">Textausgab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cm" svg:x="7.5cm" svg:y="10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cm" svg:height="1cm" svg:x="7.5cm" svg:y="12.5cm">
          <text:p text:style-name="P1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cm" svg:height="1cm" svg:x="19cm" svg:y="10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cm" svg:height="1cm" svg:x="19cm" svg:y="12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8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CFS (C++)</text:p>
          </draw:text-box>
        </draw:frame>
        <draw:frame presentation:style-name="pr5" draw:text-style-name="P3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 text:style-name="P3">LOC (David A. Wheelers 'SLOCCount')</text:p>
              </text:list-item>
            </text:list>
            <text:list text:style-name="L2">
              <text:list-item>
                <text:list>
                  <text:list-item>
                    <text:p text:style-name="P4">Total Physical Source Lines of Code: 170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velopment Effort Estimate: <text:tab/><text:tab/>44 Person Yea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tal Estimated Cost to Develop: <text:tab/><text:tab/>$ 6 Mio</text:p>
                  </text:list-item>
                </text:list>
              </text:list-item>
            </text:list>
            <text:list text:style-name="L2">
              <text:list-item>
                <text:p text:style-name="P3">Kompilieren: 10 Minuten (lokal)</text:p>
              </text:list-item>
            </text:list>
            <text:list text:style-name="L2">
              <text:list-item>
                <text:p text:style-name="P3">Hardcore C++</text:p>
              </text:list-item>
            </text:list>
            <text:list text:style-name="L2">
              <text:list-item>
                <text:list>
                  <text:list-item>
                    <text:p text:style-name="P4">Komplexe Klassenhierarchie, Templatisiert, ...</text:p>
                  </text:list-item>
                </text:list>
              </text:list-item>
            </text:list>
            <text:list text:style-name="L2">
              <text:list-item>
                <text:p text:style-name="P3">Einstiegshürde</text:p>
              </text:list-item>
            </text:list>
            <text:list text:style-name="L2">
              <text:list-item>
                <text:list>
                  <text:list-item>
                    <text:p text:style-name="P4">Komplexitä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Modelle/ Preprocessing</text:p>
          </draw:text-box>
        </draw:frame>
        <draw:frame presentation:style-name="pr5" draw:text-style-name="P3" draw:layer="layout" svg:width="25.199cm" svg:height="15.149cm" svg:x="1.4cm" svg:y="4.914cm" presentation:class="outline" presentation:user-transformed="true">
          <draw:text-box>
            <text:list text:style-name="L2">
              <text:list-item>
                <text:p text:style-name="P3">Gitter</text:p>
              </text:list-item>
            </text:list>
            <text:list text:style-name="L2">
              <text:list-item>
                <text:list>
                  <text:list-item>
                    <text:p text:style-name="P4">alle Dimensionen, gemisch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le Geometrien, gemisch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Zuordnung zu “Regionen”</text:p>
                  </text:list-item>
                </text:list>
              </text:list-item>
            </text:list>
            <text:list text:style-name="L2">
              <text:list-item>
                <text:p text:style-name="P3">Preprocessing</text:p>
              </text:list-item>
            </text:list>
            <text:list text:style-name="L2">
              <text:list-item>
                <text:list>
                  <text:list-item>
                    <text:p text:style-name="P4">ANS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nteraktive Modellierung/ eigene Skriptingfähigke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HDF5</text:p>
              </text:list-item>
            </text:list>
            <text:list text:style-name="L2">
              <text:list-item>
                <text:list>
                  <text:list-item>
                    <text:p text:style-name="P4">I/O Format: auch binär – z.B. Matlab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blembeschreibung</text:p>
          </draw:text-box>
        </draw:frame>
        <draw:frame presentation:style-name="pr6" draw:text-style-name="P10" draw:layer="layout" svg:width="25.199cm" svg:height="14.435cm" svg:x="1.4cm" svg:y="4.914cm" presentation:class="outline">
          <draw:text-box>
            <text:list text:style-name="L2">
              <text:list-item>
                <text:p text:style-name="P10">XML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10">XML-Schema</text:p>
              </text:list-item>
            </text:list>
            <text:list text:style-name="L2">
              <text:list-item>
                <text:list>
                  <text:list-item>
                    <text:p text:style-name="P4">Definiert Inhalt und Defaultwer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tomatische Überprüfung innerhalb von C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terstützte Dateierstellung (Oxygen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offizielle Dokumentation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7.5cm" svg:height="8.206cm" svg:x="6cm" svg:y="4cm">
          <draw:text-box>
            <text:p text:style-name="P1">...</text:p>
            <text:p text:style-name="P1"><text:s text:c="3"/>&lt;<text:span text:style-name="T2">pdeList</text:span>&gt;</text:p>
            <text:p text:style-name="P1"><text:s text:c="6"/>&lt;<text:span text:style-name="T2">mechanic</text:span> <text:span text:style-name="T3">subType</text:span>="planeStrain"&gt;</text:p>
            <text:p text:style-name="P1"><text:s text:c="8"/>&lt;<text:span text:style-name="T2">regionList</text:span>&gt;</text:p>
            <text:p text:style-name="P1"><text:s text:c="10"/>&lt;<text:span text:style-name="T2">region</text:span> <text:span text:style-name="T4">name</text:span>="mech"/&gt;</text:p>
            <text:p text:style-name="P1"><text:s text:c="8"/>&lt;/<text:span text:style-name="T2">regionList</text:span>&gt;</text:p>
            <text:p text:style-name="P1"><text:s text:c="8"/>&lt;<text:span text:style-name="T2">bcsAndLoads</text:span>&gt;</text:p>
            <text:p text:style-name="P1"><text:s text:c="10"/>&lt;<text:span text:style-name="T2">dirichletHom</text:span> <text:span text:style-name="T4">name</text:span>="flexible" <text:span text:style-name="T3">dof</text:span>="y"/&gt;</text:p>
            <text:p text:style-name="P1"><text:s text:c="10"/>&lt;<text:span text:style-name="T2">load</text:span> <text:span text:style-name="T3">name</text:span>="load" <text:span text:style-name="T3">dof</text:span>="y" <text:span text:style-name="T3">value</text:span>="-1e0"/&gt;</text:p>
            <text:p text:style-name="P1"><text:s text:c="8"/>&lt;/<text:span text:style-name="T2">bcsAndLoads</text:span>&gt;</text:p>
            <text:p text:style-name="P1">... <text:s text:c="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Output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usgabe von direktekten und berechneten Ergebnissen</text:p>
              </text:list-item>
            </text:list>
            <text:list text:style-name="L2">
              <text:list-item>
                <text:list>
                  <text:list-item>
                    <text:p text:style-name="P4">GID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M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S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DF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n XML wählbare Bereich in History-Fi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gionenergebnis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Entwicklungsstrategie</text:p>
          </draw:text-box>
        </draw:frame>
        <draw:frame presentation:style-name="pr5" draw:text-style-name="P3" draw:layer="layout" svg:width="25.199cm" svg:height="16.485cm" svg:x="1.4cm" svg:y="4.914cm" presentation:class="outline" presentation:user-transformed="true">
          <draw:text-box>
            <text:list text:style-name="L2">
              <text:list-item>
                <text:p text:style-name="P3">Versionsverwaltung</text:p>
              </text:list-item>
            </text:list>
            <text:list text:style-name="L2">
              <text:list-item>
                <text:list>
                  <text:list-item>
                    <text:p text:style-name="P4">Optimistischer Proz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igener Branch für al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icht alles kommt a.d. Trun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Keine Versionsplanung</text:p>
                  </text:list-item>
                </text:list>
              </text:list-item>
            </text:list>
            <text:list text:style-name="L2">
              <text:list-item>
                <text:p text:style-name="P3">Code-Hygiene</text:p>
              </text:list-item>
            </text:list>
            <text:list text:style-name="L2">
              <text:list-item>
                <text:list>
                  <text:list-item>
                    <text:p text:style-name="P4">“Leistungsträger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fgabenverteilung in CFS-Mee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Shared Code Ownership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 text:c="3"/><text:span text:style-name="T5">→</text:span> Extreme Programm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7" draw:layer="layout" svg:x1="21.5cm" svg:y1="17.5cm" svg:x2="21.5cm" svg:y2="4.5cm">
          <text:p text:style-name="P1"/>
        </draw:line>
        <draw:frame draw:style-name="gr10" draw:layer="layout" svg:width="1.912cm" svg:height="0.962cm" svg:x="22cm" svg:y="16cm">
          <draw:text-box>
            <text:p text:style-name="P1">trunk</text:p>
          </draw:text-box>
        </draw:frame>
        <draw:line draw:style-name="gr9" draw:text-style-name="P7" draw:layer="layout" svg:x1="24.5cm" svg:y1="15cm" svg:x2="24.5cm" svg:y2="9cm">
          <text:p text:style-name="P1"/>
        </draw:line>
        <draw:line draw:style-name="gr9" draw:text-style-name="P7" draw:layer="layout" svg:x1="18.5cm" svg:y1="11.5cm" svg:x2="18.5cm" svg:y2="5cm">
          <text:p text:style-name="P1"/>
        </draw:line>
        <draw:line draw:style-name="gr9" draw:text-style-name="P7" draw:layer="layout" svg:x1="21.5cm" svg:y1="15cm" svg:x2="24.5cm" svg:y2="15cm">
          <text:p text:style-name="P1"/>
        </draw:line>
        <draw:line draw:style-name="gr9" draw:text-style-name="P7" draw:layer="layout" svg:x1="24.5cm" svg:y1="13cm" svg:x2="21.5cm" svg:y2="13cm">
          <text:p text:style-name="P1"/>
        </draw:line>
        <draw:line draw:style-name="gr9" draw:text-style-name="P7" draw:layer="layout" svg:x1="21.5cm" svg:y1="11.5cm" svg:x2="18.5cm" svg:y2="11.5cm">
          <text:p text:style-name="P1"/>
        </draw:line>
        <draw:line draw:style-name="gr9" draw:text-style-name="P7" draw:layer="layout" svg:x1="24.5cm" svg:y1="10.5cm" svg:x2="21.5cm" svg:y2="10.5cm">
          <text:p text:style-name="P1"/>
        </draw:line>
        <draw:line draw:style-name="gr9" draw:text-style-name="P7" draw:layer="layout" svg:x1="21.5cm" svg:y1="9.5cm" svg:x2="18.5cm" svg:y2="9.5cm">
          <text:p text:style-name="P1"/>
        </draw:line>
        <draw:line draw:style-name="gr9" draw:text-style-name="P7" draw:layer="layout" svg:x1="18.5cm" svg:y1="6.5cm" svg:x2="21.5cm" svg:y2="6.5cm">
          <text:p text:style-name="P1"/>
        </draw:line>
        <draw:line draw:style-name="gr9" draw:text-style-name="P7" draw:layer="layout" svg:x1="24.5cm" svg:y1="9cm" svg:x2="21.5cm" svg:y2="9cm">
          <text:p text:style-name="P1"/>
        </draw:line>
        <draw:frame draw:style-name="gr10" draw:layer="layout" svg:width="2.792cm" svg:height="0.962cm" svg:x="24.712cm" svg:y="13.538cm">
          <draw:text-box>
            <text:p text:style-name="P1">branch1</text:p>
          </draw:text-box>
        </draw:frame>
        <draw:frame draw:style-name="gr10" draw:layer="layout" svg:width="2.796cm" svg:height="0.962cm" svg:x="15.5cm" svg:y="7.038cm">
          <draw:text-box>
            <text:p text:style-name="P1">branch2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oolbox</text:p>
          </draw:text-box>
        </draw:frame>
        <draw:frame presentation:style-name="pr5" draw:text-style-name="P3" draw:layer="layout" svg:width="25.199cm" svg:height="13.64cm" svg:x="1.4cm" svg:y="4.914cm" presentation:class="outline" presentation:user-transformed="true">
          <draw:text-box>
            <text:list text:style-name="L2">
              <text:list-item>
                <text:p text:style-name="P3">Verwendete Werkzeuge</text:p>
              </text:list-item>
            </text:list>
            <text:list text:style-name="L2">
              <text:list-item>
                <text:list>
                  <text:list-item>
                    <text:p text:style-name="P4">SV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estsu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rac (SVN-Browser, Wiki, Ticketsyste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Make</text:p>
                  </text:list-item>
                </text:list>
              </text:list-item>
            </text:list>
            <text:list text:style-name="L2">
              <text:list-item>
                <text:p text:style-name="P3">Dokumentation</text:p>
              </text:list-item>
            </text:list>
            <text:list text:style-name="L2">
              <text:list-item>
                <text:list>
                  <text:list-item>
                    <text:p text:style-name="P4">Doxyg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nu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i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estsuit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a. 100 Testfälle</text:p>
              </text:list-item>
            </text:list>
            <text:list text:style-name="L2">
              <text:list-item>
                <text:p text:style-name="P3">Gesamtlaufzeit ca. 2 min</text:p>
              </text:list-item>
            </text:list>
            <text:list text:style-name="L2">
              <text:list-item>
                <text:p text:style-name="P3">Toleranzvergleich mit Referenzergebnis</text:p>
              </text:list-item>
            </text:list>
            <text:list text:style-name="L2">
              <text:list-item>
                <text:p text:style-name="P3">Unterstützung durch ctest</text:p>
              </text:list-item>
            </text:list>
            <text:list text:style-name="L2">
              <text:list-item>
                <text:p text:style-name="P3">Beispielsammlung (Paramet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11" draw:text-style-name="P7" draw:layer="layout" svg:width="8.5cm" svg:height="2.5cm" svg:x="9.5cm" svg:y="1.5cm">
          <draw:image xlink:href="Pictures/10000201000000D60000003DF1576F50.png" xlink:type="simple" xlink:show="embed" xlink:actuate="onLoad">
            <text:p text:style-name="P1"/>
          </draw:image>
        </draw:frame>
        <draw:frame presentation:style-name="pr7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Interne Webanwendung</text:p>
              </text:list-item>
            </text:list>
            <text:list text:style-name="L4">
              <text:list-item>
                <text:list>
                  <text:list-item>
                    <text:p text:style-name="P1">SVN Brow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">Ticket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">Wik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Dokument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offenes Diskusionsfor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CMak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lattformunabhängiges Buildsystem</text:p>
              </text:list-item>
            </text:list>
            <text:list text:style-name="L2">
              <text:list-item>
                <text:p text:style-name="P3">Abstraktion von “make” und “configure”</text:p>
              </text:list-item>
            </text:list>
            <text:list text:style-name="L2">
              <text:list-item>
                <text:p text:style-name="P3">Programmierbar</text:p>
              </text:list-item>
            </text:list>
            <text:list text:style-name="L2">
              <text:list-item>
                <text:p text:style-name="P3">Interaktive Benutzeroberfläche</text:p>
              </text:list-item>
            </text:list>
            <text:list text:style-name="L2">
              <text:list-item>
                <text:p text:style-name="P3">Erzeugt Make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okumentation</text:p>
          </draw:text-box>
        </draw:frame>
        <draw:frame presentation:style-name="pr5" draw:text-style-name="P3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style-name="P3">Doxygen</text:p>
              </text:list-item>
            </text:list>
            <text:list text:style-name="L2">
              <text:list-item>
                <text:list>
                  <text:list-item>
                    <text:p text:style-name="P4">Dokumentation im Code mit spezieller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3">Manuals (Latex)</text:p>
              </text:list-item>
            </text:list>
            <text:list text:style-name="L2">
              <text:list-item>
                <text:list>
                  <text:list-item>
                    <text:p text:style-name="P4">XML-Reference Man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FS-Manual </text:p>
                  </text:list-item>
                </text:list>
              </text:list-item>
            </text:list>
            <text:list text:style-name="L2">
              <text:list-item>
                <text:p text:style-name="P3">Wiki</text:p>
              </text:list-item>
            </text:list>
          </draw:text-box>
        </draw:frame>
        <draw:frame draw:style-name="gr12" draw:text-style-name="P1" draw:layer="layout" svg:width="22.843cm" svg:height="3.096cm" svg:x="3.657cm" svg:y="8.404cm">
          <draw:text-box>
            <text:p text:style-name="P1"><text:span text:style-name="T6">/** Evaluates the gradient of the cost function. </text:span></text:p>
            <text:p text:style-name="P1"><text:span text:style-name="T6"><text:s/></text:span><text:span text:style-name="T6">* Saves the result to data.objective_gradient <text:s/></text:span></text:p>
            <text:p text:style-name="P1"><text:span text:style-name="T6"><text:s/></text:span><text:span text:style-name="T6">* @param grad_out if not NULL copy write the (design space size) results. */</text:span></text:p>
            <text:p text:style-name="P1"><text:s/><text:span text:style-name="T3">virtual</text:span> <text:span text:style-name="T3">void</text:span> <text:span text:style-name="T1">CalcObjectiveGradient</text:span>(<text:span text:style-name="T3">double</text:span>* grad_out);</text:p>
          </draw:text-box>
        </draw:frame>
        <draw:frame draw:style-name="gr11" draw:text-style-name="P7" draw:layer="layout" svg:width="12.911cm" svg:height="3.042cm" svg:x="14.089cm" svg:y="3.5cm">
          <draw:image xlink:href="Pictures/10000200000001E800000073ED82791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Logging (Boost)</text:p>
          </draw:text-box>
        </draw:frame>
        <draw:frame presentation:style-name="pr5" draw:text-style-name="P3" draw:layer="layout" svg:width="25.199cm" svg:height="15.13cm" svg:x="1.4cm" svg:y="4.914cm" presentation:class="outline" presentation:user-transformed="true">
          <draw:text-box>
            <text:list text:style-name="L2">
              <text:list-item>
                <text:p text:style-name="P3">Beliebige Logging-Streams im Code</text:p>
              </text:list-item>
            </text:list>
            <text:list text:style-name="L2">
              <text:list-item>
                <text:p text:style-name="P3">Verschiede Log-Level</text:p>
              </text:list-item>
            </text:list>
            <text:list text:style-name="L2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10">Ausgabe über Steuerungsdatei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10">Ergebnis:</text:p>
              </text:list-item>
            </text:list>
          </draw:text-box>
        </draw:frame>
        <draw:frame draw:style-name="gr13" draw:text-style-name="P14" draw:layer="layout" svg:width="25.5cm" svg:height="1.725cm" svg:x="1cm" svg:y="9cm">
          <draw:text-box>
            <text:p text:style-name="P13"><text:span text:style-name="T7">cost</text:span><text:span text:style-name="T8">-&gt;SetValue(((complex&lt;</text:span><text:span text:style-name="T9">double</text:span><text:span text:style-name="T8">&gt;) inner).real());</text:span></text:p>
            <text:p text:style-name="P13"><text:span text:style-name="T8">LOG_DBG2(simp) &lt;&lt; </text:span><text:span text:style-name="T10">"&lt;l,u&gt;:"</text:span><text:span text:style-name="T8"> &lt;&lt; inner &lt;&lt; </text:span><text:span text:style-name="T10">"-&gt;"</text:span><text:span text:style-name="T8"> &lt;&lt; </text:span><text:span text:style-name="T7">cost-&gt;</text:span><text:span text:style-name="T8">GetValue();</text:span></text:p>
          </draw:text-box>
        </draw:frame>
        <draw:frame draw:style-name="gr14" draw:text-style-name="P15" draw:layer="layout" svg:width="17.003cm" svg:height="4.186cm" svg:x="2cm" svg:y="13.5cm">
          <draw:text-box>
            <text:p text:style-name="P1"><text:span text:style-name="T11"><text:s text:c="4"/></text:span><text:span text:style-name="T11">cfs logConf setLogLevel conditions trace <text:s text:c="3"/></text:span></text:p>
            <text:p text:style-name="P1"><text:span text:style-name="T11"><text:s text:c="4"/></text:span><text:span text:style-name="T11">cfs logConf addAppender conditions cout ""</text:span></text:p>
            <text:p text:style-name="P1"><text:span text:style-name="T11"/></text:p>
            <text:p text:style-name="P1"><text:span text:style-name="T11"><text:s text:c="4"/></text:span><text:span text:style-name="T11">cfs logConf setLogLevel simp dbg3 <text:s text:c="3"/></text:span></text:p>
            <text:p text:style-name="P1"><text:span text:style-name="T11"><text:s text:c="4"/></text:span><text:span text:style-name="T11">cfs logConf addAppender simp file "simp.txt"</text:span></text:p>
          </draw:text-box>
        </draw:frame>
        <draw:frame draw:style-name="gr15" draw:text-style-name="P15" draw:layer="layout" svg:width="18.5cm" svg:height="1.038cm" svg:x="8cm" svg:y="18.962cm">
          <draw:text-box>
            <text:p text:style-name="P1"><text:span text:style-name="T11">[simp] 399: output &lt;l,u&gt;: (73.1096, 0.0) -&gt; 73.109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ebug-Modu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Logging ist aktiviert</text:p>
              </text:list-item>
            </text:list>
            <text:list text:style-name="L2">
              <text:list-item>
                <text:p text:style-name="P3">Bereichs- und Plausibilitätsprüfungen</text:p>
              </text:list-item>
            </text:list>
            <text:list text:style-name="L2">
              <text:list-item>
                <text:p text:style-name="P3">Asserts</text:p>
              </text:list-item>
            </text:list>
            <text:list text:style-name="L2">
              <text:list-item>
                <text:p text:style-name="P3">Exceptions können Segfault erzeugen</text:p>
              </text:list-item>
            </text:list>
            <text:list text:style-name="L2">
              <text:list-item>
                <text:list>
                  <text:list-item>
                    <text:p text:style-name="P4">Leichtes Debuggen von Fehlern</text:p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><text:s text:c="3"/><text:span text:style-name="T5">→ </text:span><text:span text:style-name="T5">ca. 5-10 mal langsam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lbany AMT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lbany AMT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1-07T16:41:00</meta:creation-date>
    <dc:date>2008-10-13T18:10:29</dc:date>
    <meta:editing-cycles>6</meta:editing-cycles>
    <meta:editing-duration>PT23H3M26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